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F0000038BE1A95BCE471AEF55.png" manifest:media-type="image/png"/>
  <manifest:file-entry manifest:full-path="Pictures/1000020100000391000001041AA6F10E04E566CA.png" manifest:media-type="image/png"/>
  <manifest:file-entry manifest:full-path="Pictures/100002010000077F000003B68E2B25BCE40060E7.png" manifest:media-type="image/png"/>
  <manifest:file-entry manifest:full-path="Pictures/10000201000007390000039DC0AE372AFDF1EEF4.png" manifest:media-type="image/png"/>
  <manifest:file-entry manifest:full-path="Pictures/10000201000007330000039E80668E74736C15E7.png" manifest:media-type="image/png"/>
  <manifest:file-entry manifest:full-path="Pictures/10000201000007330000039D34E441958196C33F.png" manifest:media-type="image/png"/>
  <manifest:file-entry manifest:full-path="Pictures/1000020100000736000003A16A0F36FC1F661895.png" manifest:media-type="image/png"/>
  <manifest:file-entry manifest:full-path="Pictures/10000201000007340000039E17D3AF8A49FFEA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eac"/>
    </style:style>
    <style:style style:name="P2" style:family="paragraph" style:parent-style-name="Standard">
      <style:text-properties officeooo:paragraph-rsid="002355c7"/>
    </style:style>
    <style:style style:name="P3" style:family="paragraph" style:parent-style-name="Standard">
      <style:paragraph-properties fo:break-before="page"/>
      <style:text-properties officeooo:paragraph-rsid="002355c7"/>
    </style:style>
    <style:style style:name="P4" style:family="paragraph" style:parent-style-name="Header">
      <style:text-properties officeooo:rsid="0029d2da" officeooo:paragraph-rsid="0029d2da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officeooo:paragraph-rsid="002823d7" style:font-name-asian="Noto Sans Mono CJK SC" style:font-name-complex="Liberation Mono"/>
    </style:style>
    <style:style style:name="P7" style:family="paragraph" style:parent-style-name="Standard">
      <style:text-properties style:font-name="Liberation Sans" officeooo:paragraph-rsid="0029b21a" style:font-name-asian="Noto Sans Mono CJK SC" style:font-name-complex="Liberation Mono"/>
    </style:style>
    <style:style style:name="P8" style:family="paragraph" style:parent-style-name="Standard">
      <style:text-properties officeooo:paragraph-rsid="001f9eac"/>
    </style:style>
    <style:style style:name="P9" style:family="paragraph" style:parent-style-name="Standard">
      <style:text-properties officeooo:paragraph-rsid="0024b0a8"/>
    </style:style>
    <style:style style:name="P10" style:family="paragraph" style:parent-style-name="Standard">
      <style:text-properties officeooo:paragraph-rsid="0027ad76"/>
    </style:style>
    <style:style style:name="P11" style:family="paragraph" style:parent-style-name="Standard">
      <style:text-properties officeooo:paragraph-rsid="002823d7"/>
    </style:style>
    <style:style style:name="P12" style:family="paragraph" style:parent-style-name="Standard">
      <style:text-properties officeooo:paragraph-rsid="0029b21a"/>
    </style:style>
    <style:style style:name="P13" style:family="paragraph" style:parent-style-name="Standard">
      <style:text-properties officeooo:paragraph-rsid="0029d2da"/>
    </style:style>
    <style:style style:name="P14" style:family="paragraph" style:parent-style-name="Standard">
      <style:text-properties officeooo:paragraph-rsid="002a7360"/>
    </style:style>
    <style:style style:name="P15" style:family="paragraph" style:parent-style-name="Standard">
      <style:text-properties officeooo:paragraph-rsid="002355c7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529" style:font-name="system-ui" fo:font-size="12pt" fo:letter-spacing="normal" fo:font-style="normal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4a309"/>
    </style:style>
    <style:style style:name="T3" style:family="text">
      <style:text-properties style:font-name="Liberation Sans" officeooo:rsid="0024b0a8"/>
    </style:style>
    <style:style style:name="T4" style:family="text">
      <style:text-properties style:font-name="Liberation Sans" officeooo:rsid="001f9eac"/>
    </style:style>
    <style:style style:name="T5" style:family="text">
      <style:text-properties style:font-name="Liberation Sans" officeooo:rsid="0021c0fa"/>
    </style:style>
    <style:style style:name="T6" style:family="text">
      <style:text-properties style:font-name="Liberation Sans" officeooo:rsid="002355c7"/>
    </style:style>
    <style:style style:name="T7" style:family="text">
      <style:text-properties style:font-name="Liberation Sans" officeooo:rsid="0026fe7c"/>
    </style:style>
    <style:style style:name="T8" style:family="text">
      <style:text-properties style:font-name="Liberation Sans" officeooo:rsid="0027ad76"/>
    </style:style>
    <style:style style:name="T9" style:family="text">
      <style:text-properties style:font-name="Liberation Sans" officeooo:rsid="002823d7"/>
    </style:style>
    <style:style style:name="T10" style:family="text">
      <style:text-properties style:font-name="Liberation Sans" officeooo:rsid="002823d7" style:font-name-asian="Noto Sans Mono CJK SC" style:font-name-complex="Liberation Mono"/>
    </style:style>
    <style:style style:name="T11" style:family="text">
      <style:text-properties style:font-name="Liberation Sans" officeooo:rsid="0029b21a" style:font-name-asian="Noto Sans Mono CJK SC" style:font-name-complex="Liberation Mono"/>
    </style:style>
    <style:style style:name="T12" style:family="text">
      <style:text-properties style:font-name="Liberation Sans" officeooo:rsid="002a7360" style:font-name-asian="Noto Sans Mono CJK SC" style:font-name-complex="Liberation Mono"/>
    </style:style>
    <style:style style:name="T13" style:family="text">
      <style:text-properties style:font-name="Liberation Sans" officeooo:rsid="0029b21a"/>
    </style:style>
    <style:style style:name="T14" style:family="text">
      <style:text-properties style:font-name="Liberation Sans" officeooo:rsid="0029d2da"/>
    </style:style>
    <style:style style:name="T15" style:family="text">
      <style:text-properties style:font-name="Liberation Sans" officeooo:rsid="002a7360"/>
    </style:style>
    <style:style style:name="T16" style:family="text">
      <style:text-properties officeooo:rsid="002a7360"/>
    </style:style>
    <style:style style:name="T17" style:family="text">
      <style:text-properties fo:color="#000000"/>
    </style:style>
    <style:style style:name="T18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style:font-name="JetBrains Mono1" fo:font-size="10pt" fo:font-style="italic" fo:font-weight="normal" style:font-size-asian="10pt" style:font-style-asian="italic" style:font-weight-asian="normal"/>
    </style:style>
    <style:style style:name="T26" style:family="text">
      <style:text-properties fo:color="#000000" style:font-name="JetBrains Mono" fo:font-size="10pt" fo:font-style="normal" fo:font-weight="normal" officeooo:rsid="0029b21a" style:font-size-asian="10pt" style:font-style-asian="normal" style:font-weight-asian="normal"/>
    </style:style>
    <style:style style:name="T27" style:family="text">
      <style:text-properties fo:color="#000000" officeooo:rsid="002a7360"/>
    </style:style>
    <style:style style:name="T28" style:family="text">
      <style:text-properties fo:font-variant="normal" fo:text-transform="none" fo:color="#212529" style:font-name="var bs-font-monospace" fo:font-size="12pt" fo:letter-spacing="normal" fo:font-style="normal" fo:font-weight="normal" officeooo:rsid="002a7360" fo:background-color="#efefef" loext:char-shading-value="0" loext:padding="0in" loext:border="none"/>
    </style:style>
    <style:style style:name="T29" style:family="text">
      <style:text-properties fo:font-variant="normal" fo:text-transform="none" fo:color="#212529" style:font-name="Liberation Sans" fo:font-size="12pt" fo:letter-spacing="normal" fo:font-style="normal" fo:font-weight="normal" officeooo:rsid="002a7360" fo:background-color="#efefef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eycloak Kurulumu </text:p>
      <text:p text:style-name="P5"/>
      <text:p text:style-name="Standard"><text:span text:style-name="T3">yaml uzantılı dosyamızın olduğu klasöre gelip ‘ </text:span><text:span text:style-name="Source_20_Text"><text:span text:style-name="T2">docker-compose up -d ‘ <text:s/></text:span></text:span><text:span text:style-name="Source_20_Text"><text:span text:style-name="T3">komutunu terminalde çalıştırıyoruz. </text:span></text:span><text:span text:style-name="Source_20_Text"><text:span text:style-name="T15">Eğerki container ayağa kalktıktan sonra username, password hatası verirse başka bir terminalde </text:span></text:span><text:span text:style-name="Source_20_Text"><text:span text:style-name="T28">docker run -p 8080:8080 -e KEYCLOAK_ADMIN=admin -e KEYCLOAK_ADMIN_PASSWORD=admin quay.io/keycloak/keycloak:24.0.1 start-dev <text:s/></text:span></text:span><text:span text:style-name="Source_20_Text"><text:span text:style-name="T15">kodunu çalıştırabilirsiniz.</text:span></text:span></text:p>
      <text:p text:style-name="P16"><text:s/></text:p>
      <text:p text:style-name="P9"><text:span text:style-name="Source_20_Text"><text:span text:style-name="T15"/></text:span></text:p>
      <text:p text:style-name="Standard"><text:span text:style-name="Source_20_Text"><text:span text:style-name="T1"/></text:span></text:p>
      <text:p text:style-name="P1"><text:span text:style-name="Source_20_Text"><text:span text:style-name="T4">kodumuzu terminalde çalıştırdıktan sonra 8080 portundan erişime hazır hale gelecek.</text:span></text:span></text:p>
      <text:p text:style-name="P1"><text:span text:style-name="Source_20_Text"><text:span text:style-name="T1"/></text:span></text:p>
      <text:p text:style-name="P1"><text:span text:style-name="Source_20_Text"><text:span text:style-name="T4">Keycloak </text:span></text:span><text:span text:style-name="Source_20_Text"><text:span text:style-name="T5">username = admin, password = admin diyerek giriş yapıyoruz.</text:span></text:span></text:p>
      <text:p text:style-name="P1"><text:span text:style-name="Source_20_Text"><text:span text:style-name="T5"/></text:span></text:p>
      <text:p text:style-name="P11"><text:span text:style-name="Source_20_Text"><text:span text:style-name="T10">Giriş yaptıktan sonra </text:span></text:span><text:span text:style-name="Source_20_Text"><text:span text:style-name="T7"><text:s/>Create realm butonuna tıklayıp bir realm oluşturuyoruz.</text:span></text:span></text:p>
      <text:p text:style-name="P1"><text:span text:style-name="Source_20_Text"><text:span text:style-name="T5"/></text:span></text:p>
      <text:p text:style-name="P1"><draw:frame draw:style-name="fr3" draw:name="Image1" text:anchor-type="char" svg:x="0in" svg:y="0.0681in" svg:width="6.6929in" svg:height="3.3602in" draw:z-index="0"><draw:image xlink:href="Pictures/10000201000007340000039E17D3AF8A49FFEADF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oft-page-break/><text:span text:style-name="Source_20_Text"><text:span text:style-name="T8">Oluştuduktan sonra Clients menüsüne girip Create client diyerek yeni bir client oluşturuyoruz.</text:span></text:span></text:p>
      <text:p text:style-name="P11"><draw:frame draw:style-name="fr2" draw:name="Image2" text:anchor-type="char" svg:width="6.6929in" svg:height="3.3591in" draw:z-index="1"><draw:image xlink:href="Pictures/10000201000007330000039D34E441958196C33F.png" xlink:type="simple" xlink:show="embed" xlink:actuate="onLoad" loext:mime-type="image/png"/></draw:frame><text:span text:style-name="Source_20_Text"><text:span text:style-name="T8"/></text:span></text:p>
      <text:p text:style-name="P10"><text:span text:style-name="Source_20_Text"><text:span text:style-name="T10">General Settings alanında</text:span></text:span><text:span text:style-name="Source_20_Text"><text:span text:style-name="T8"> Client ID kısmını dolduruyoruz.</text:span></text:span></text:p>
      <text:p text:style-name="P10"><text:span text:style-name="Source_20_Text"><text:span text:style-name="T8"/></text:span></text:p>
      <text:p text:style-name="P10"><draw:frame draw:style-name="fr2" draw:name="Image3" text:anchor-type="char" svg:width="6.6929in" svg:height="3.3626in" draw:z-index="2"><draw:image xlink:href="Pictures/10000201000007330000039E80668E74736C15E7.png" xlink:type="simple" xlink:show="embed" xlink:actuate="onLoad" loext:mime-type="image/png"/></draw:frame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oft-page-break/><text:span text:style-name="Source_20_Text"><text:span text:style-name="T9">Capability config alanında </text:span></text:span><text:span text:style-name="Source_20_Text"><text:span text:style-name="T8"><text:s/></text:span></text:span><text:span text:style-name="Source_20_Text"><text:span text:style-name="T9">Client authentication butonunu aktif hale getiriyoruz.</text:span></text:span></text:p>
      <text:p text:style-name="P10"><text:span text:style-name="Source_20_Text"><text:span text:style-name="T9"/></text:span></text:p>
      <text:p text:style-name="P10"><draw:frame draw:style-name="fr2" draw:name="Image4" text:anchor-type="char" svg:width="6.6929in" svg:height="3.348in" draw:z-index="3"><draw:image xlink:href="Pictures/10000201000007390000039DC0AE372AFDF1EEF4.png" xlink:type="simple" xlink:show="embed" xlink:actuate="onLoad" loext:mime-type="image/png"/></draw:frame><text:span text:style-name="Source_20_Text"><text:span text:style-name="T9"/></text:span></text:p>
      <text:p text:style-name="P10"><text:span text:style-name="Source_20_Text"><text:span text:style-name="T9"/></text:span></text:p>
      <text:p text:style-name="P7"><text:span text:style-name="Source_20_Text"><text:span text:style-name="T9">Login Settings alanında Valid redirect URLs alanına projemizin çalıştığı urlyi yazıyoruz. Buraya kullanıcının authenticate olarak giriş yapması gereken url’leri yazabilirsiniz. Ben</text:span></text:span></text:p>
      <text:p text:style-name="P7"><text:span text:style-name="Source_20_Text"><text:span text:style-name="T9"><text:s/>tüm apilerime ulaşmasına izin vereceğim. Web origins alanında Cross origin belirliyoruz. <text:s text:c="3"/>* işareti koyarak tüm makinelerin bağlanabileceğini belirtiyoruz.</text:span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10"><draw:frame draw:style-name="fr1" draw:name="Image5" text:anchor-type="char" svg:width="6.6929in" svg:height="3.3681in" draw:z-index="4"><draw:image xlink:href="Pictures/1000020100000736000003A16A0F36FC1F661895.png" xlink:type="simple" xlink:show="embed" xlink:actuate="onLoad" loext:mime-type="image/png"/></draw:frame><text:span text:style-name="Source_20_Text"><text:span text:style-name="T8"/></text:span></text:p>
      <text:p text:style-name="P1"><text:span text:style-name="Source_20_Text"><text:span text:style-name="T5"/></text:span></text:p>
      <text:p text:style-name="P11"><text:span text:style-name="Source_20_Text"><text:span text:style-name="T9"/></text:span></text:p>
      <text:p text:style-name="P11"><text:span text:style-name="Source_20_Text"><text:span text:style-name="T9"/></text:span></text:p>
      <text:p text:style-name="P11"><text:soft-page-break/><text:span text:style-name="Source_20_Text"><text:span text:style-name="T9">Save dedikten sonra </text:span></text:span><text:span text:style-name="Source_20_Text"><text:span text:style-name="T11">Users alanına girip Add user diyerek bir user oluşturacağız.</text:span></text:span></text:p>
      <text:p text:style-name="P11"><text:span text:style-name="Source_20_Text"><text:span text:style-name="T11"/></text:span></text:p>
      <text:p text:style-name="P11"><draw:frame draw:style-name="fr2" draw:name="Image7" text:anchor-type="char" svg:width="6.6929in" svg:height="3.3134in" draw:z-index="6"><draw:image xlink:href="Pictures/100002010000077F000003B68E2B25BCE40060E7.png" xlink:type="simple" xlink:show="embed" xlink:actuate="onLoad" loext:mime-type="image/png"/></draw:frame><text:span text:style-name="Source_20_Text"><text:span text:style-name="T11"/></text:span></text:p>
      <text:p text:style-name="P11"><text:span text:style-name="Source_20_Text"><text:span text:style-name="T11"/></text:span></text:p>
      <text:p text:style-name="P11"><text:span text:style-name="Source_20_Text"><text:span text:style-name="T9"/></text:span></text:p>
      <text:p text:style-name="P11"><text:span text:style-name="Source_20_Text"><text:span text:style-name="T9"/></text:span></text:p>
      <text:p text:style-name="P13"><text:span text:style-name="Source_20_Text"><text:span text:style-name="T14">User oluşturduktan sonra Clients alanına girip oluşturduğumuz Demo-Client ‘ a tıklıyoruz ve Credential alanına giriyoruz. Buradaki Client Secret tokenini kopyalıyoruz.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/></text:span></text:p>
      <text:p text:style-name="P11"><draw:frame draw:style-name="fr2" draw:name="Image6" text:anchor-type="char" svg:width="6.6929in" svg:height="3.3591in" draw:z-index="5"><draw:image xlink:href="Pictures/100002010000070F0000038BE1A95BCE471AEF55.png" xlink:type="simple" xlink:show="embed" xlink:actuate="onLoad" loext:mime-type="image/png"/></draw:frame><text:span text:style-name="Source_20_Text"><text:span text:style-name="T9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oft-page-break/><text:span text:style-name="Source_20_Text"><text:span text:style-name="T1"/></text:span></text:p>
      <text:p text:style-name="P12"><text:span text:style-name="Source_20_Text"><text:span text:style-name="T13">Spring Boot projemizde application.properties dosyasını açıp bilgileri girelim.</text:span></text:span></text:p>
      <text:p text:style-name="P12"><text:span text:style-name="Source_20_Text"><text:span text:style-name="T13"/></text:span></text:p>
      <text:p text:style-name="P12"><text:span text:style-name="Source_20_Text"><text:span text:style-name="T26">## logging</text:span></text:span><text:span text:style-name="T17"><text:line-break/></text:span><text:span text:style-name="T18">logging.level.org.springframework.security</text:span><text:span text:style-name="T18">=</text:span><text:span text:style-name="T18">INFO</text:span><text:span text:style-name="T17"><text:line-break/></text:span><text:span text:style-name="T18">logging.pattern.console</text:span><text:span text:style-name="T18">=</text:span><text:span text:style-name="T18">%d{dd-MM-yyyy HH:mm:ss} %magenta([%thread]) %highlight(%-5level) %logger.%M - %msg%n</text:span><text:span text:style-name="T17"><text:line-break/><text:line-break/></text:span><text:span text:style-name="T18">## keycloak</text:span><text:span text:style-name="T17"><text:line-break/></text:span><text:span text:style-name="T18">spring.security.oauth2.client.provider.Demo.</text:span><text:span text:style-name="T18">issuer-uri</text:span><text:span text:style-name="T18">=</text:span><text:span text:style-name="T18">http://localhost:8080/realms/Demo</text:span><text:span text:style-name="T17"><text:line-break/></text:span><text:span text:style-name="T18">spring.security.oauth2.client.registration.Demo.</text:span><text:span text:style-name="T18">provider</text:span><text:span text:style-name="T18">=</text:span><text:span text:style-name="T18">Demo</text:span><text:span text:style-name="T17"><text:line-break/></text:span><text:span text:style-name="T18">spring.security.oauth2.client.registration.Demo.</text:span><text:span text:style-name="T18">client-id</text:span><text:span text:style-name="T18">=</text:span><text:span text:style-name="T18">Demo-Client</text:span><text:span text:style-name="T17"><text:line-break/></text:span><text:span text:style-name="T18">spring.security.oauth2.client.registration.Demo.</text:span><text:span text:style-name="T18">client-secret</text:span><text:span text:style-name="T18">=</text:span><text:span text:style-name="T18">( kopyaladiginiz secret keyi buraya yapistirin)</text:span><text:span text:style-name="T17"><text:line-break/></text:span><text:span text:style-name="T18">spring.security.oauth2.client.registration.Demo.</text:span><text:span text:style-name="T18">scope</text:span><text:span text:style-name="T18">=</text:span><text:span text:style-name="T18">openid,offline_access,profile</text:span><text:span text:style-name="T17"><text:line-break/></text:span><text:span text:style-name="T18">spring.security.oauth2.client.registration.Demo.</text:span><text:span text:style-name="T18">authorization-grant-type</text:span><text:span text:style-name="T18">=</text:span><text:span text:style-name="T18">authorization_code</text:span></text:p>
      <text:p text:style-name="P12"><text:span text:style-name="Source_20_Text"><text:span text:style-name="T13"/></text:span></text:p>
      <text:p text:style-name="P12"><draw:frame draw:style-name="fr1" draw:name="Image8" text:anchor-type="char" svg:width="6.6929in" svg:height="1.9055in" draw:z-index="7"><draw:image xlink:href="Pictures/1000020100000391000001041AA6F10E04E566CA.png" xlink:type="simple" xlink:show="embed" xlink:actuate="onLoad" loext:mime-type="image/png"/></draw:frame><text:span text:style-name="Source_20_Text"><text:span text:style-name="T13"/></text:span></text:p>
      <text:p text:style-name="P12"><text:span text:style-name="Source_20_Text"><text:span text:style-name="T13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oft-page-break/><text:span text:style-name="Source_20_Text"><text:span text:style-name="T15">Kodumuzu ekleyip </text:span></text:span><text:span text:style-name="Source_20_Text"><text:span text:style-name="T12">Keycloak</text:span></text:span><text:span text:style-name="Source_20_Text"><text:span text:style-name="T15"> adında bir controller dosyası oluşturuyoruz. Aşağıdaki kodları ekliyoruz.<text:line-break/><text:line-break/><text:line-break/></text:span></text:span><text:span text:style-name="T18">import </text:span><text:span text:style-name="T18">jakarta.servlet.http.HttpServletRequest</text:span><text:span text:style-name="T18">;</text:span><text:span text:style-name="T17"><text:line-break/></text:span><text:span text:style-name="T18">import </text:span><text:span text:style-name="T18">org.springframework.security.core.Authentication</text:span><text:span text:style-name="T18">;</text:span><text:span text:style-name="T17"><text:line-break/></text:span><text:span text:style-name="T18">import </text:span><text:span text:style-name="T18">org.springframework.security.core.context.SecurityContextHolder</text:span><text:span text:style-name="T18">;</text:span><text:span text:style-name="T17"><text:line-break/></text:span><text:span text:style-name="T18">import </text:span><text:span text:style-name="T18">org.springframework.security.oauth2.core.user.OAuth2User</text:span><text:span text:style-name="T18">;</text:span><text:span text:style-name="T17"><text:line-break/></text:span><text:span text:style-name="T18">import </text:span><text:span text:style-name="T18">org.springframework.security.web.authentication.logout.SecurityContextLogoutHandler</text:span><text:span text:style-name="T18">;</text:span><text:span text:style-name="T17"><text:line-break/></text:span><text:span text:style-name="T18">import </text:span><text:span text:style-name="T18">org.springframework.web.bind.annotation.</text:span><text:span text:style-name="T18">GetMapping</text:span><text:span text:style-name="T18">;</text:span><text:span text:style-name="T17"><text:line-break/></text:span><text:span text:style-name="T18">import </text:span><text:span text:style-name="T18">org.springframework.web.bind.annotation.</text:span><text:span text:style-name="T18">RestController</text:span><text:span text:style-name="T18">;</text:span><text:span text:style-name="T17"><text:line-break/><text:line-break/></text:span><text:span text:style-name="T18">import </text:span><text:span text:style-name="T18">java.util.HashMap</text:span><text:span text:style-name="T18">;</text:span><text:span text:style-name="T17"><text:line-break/><text:line-break/></text:span><text:span text:style-name="T18">@RestController</text:span><text:span text:style-name="T17"><text:line-break/></text:span><text:span text:style-name="T18">public class </text:span><text:span text:style-name="T18">Keycloak {</text:span><text:span text:style-name="T17"><text:line-break/></text:span><text:span text:style-name="T18"> <text:s text:c="3"/></text:span><text:span text:style-name="T18">@GetMapping</text:span><text:span text:style-name="T18">(path = </text:span><text:span text:style-name="T18">"/"</text:span><text:span text:style-name="T18">)</text:span><text:span text:style-name="T17"><text:line-break/></text:span><text:span text:style-name="T18"> <text:s text:c="3"/></text:span><text:span text:style-name="T18">public </text:span><text:span text:style-name="T18">HashMap </text:span><text:span text:style-name="T18">index</text:span><text:span text:style-name="T18">() {</text:span><text:span text:style-name="T17"><text:line-break/></text:span><text:span text:style-name="T18"> <text:s text:c="7"/></text:span><text:span text:style-name="T18">// get a successful user login</text:span><text:span text:style-name="T17"><text:line-break/></text:span><text:span text:style-name="T18"> <text:s text:c="7"/></text:span><text:span text:style-name="T18">OAuth2User user = ((OAuth2User) SecurityContextHolder.</text:span><text:span text:style-name="T25">getContext</text:span><text:span text:style-name="T18">().getAuthentication().getPrincipal())</text:span><text:span text:style-name="T18">;</text:span><text:span text:style-name="T17"><text:line-break/></text:span><text:span text:style-name="T18"> <text:s text:c="7"/>return new </text:span><text:span text:style-name="T18">HashMap(){{</text:span><text:span text:style-name="T17"><text:line-break/></text:span><text:span text:style-name="T18"> <text:s text:c="11"/>put(</text:span><text:span text:style-name="T18">user</text:span><text:span text:style-name="T18">.getAttribute(</text:span><text:span text:style-name="T18">"name"</text:span><text:span text:style-name="T18">)</text:span><text:span text:style-name="T18">,</text:span><text:span text:style-name="T18">" sisteme giriş yaptı."</text:span><text:span text:style-name="T18">)</text:span><text:span text:style-name="T18">;</text:span><text:span text:style-name="T17"><text:line-break/></text:span><text:span text:style-name="T18"> <text:s text:c="7"/></text:span><text:span text:style-name="T18">}}</text:span><text:span text:style-name="T18">;</text:span><text:span text:style-name="T17"><text:line-break/></text:span><text:span text:style-name="T18"> <text:s text:c="3"/></text:span><text:span text:style-name="T18">}</text:span><text:span text:style-name="T17"><text:line-break/><text:line-break/></text:span><text:span text:style-name="T18"> <text:s text:c="3"/></text:span><text:span text:style-name="T18">@GetMapping</text:span><text:span text:style-name="T18">(path = </text:span><text:span text:style-name="T18">"/unauthenticated"</text:span><text:span text:style-name="T18">)</text:span><text:span text:style-name="T17"><text:line-break/></text:span><text:span text:style-name="T18"> <text:s text:c="3"/></text:span><text:span text:style-name="T18">public </text:span><text:span text:style-name="T18">HashMap </text:span><text:span text:style-name="T18">unauthenticatedRequests</text:span><text:span text:style-name="T18">(HttpServletRequest request) {</text:span><text:span text:style-name="T17"><text:line-break/></text:span><text:span text:style-name="T18"> <text:s text:c="7"/></text:span><text:span text:style-name="T18">// Logout the current user</text:span><text:span text:style-name="T17"><text:line-break/></text:span><text:span text:style-name="T18"> <text:s text:c="7"/></text:span><text:span text:style-name="T18">Authentication auth = SecurityContextHolder.</text:span><text:span text:style-name="T25">getContext</text:span><text:span text:style-name="T18">().getAuthentication()</text:span><text:span text:style-name="T18">;</text:span><text:span text:style-name="T17"><text:line-break/></text:span><text:span text:style-name="T18"> <text:s text:c="7"/>if </text:span><text:span text:style-name="T18">(auth != </text:span><text:span text:style-name="T18">null</text:span><text:span text:style-name="T18">) {</text:span><text:span text:style-name="T17"><text:line-break/></text:span><text:span text:style-name="T18"> <text:s text:c="11"/></text:span><text:span text:style-name="T18">new </text:span><text:span text:style-name="T18">SecurityContextLogoutHandler().logout(request</text:span><text:span text:style-name="T18">, null, </text:span><text:span text:style-name="T18">auth)</text:span><text:span text:style-name="T18">;</text:span><text:span text:style-name="T17"><text:line-break/></text:span><text:span text:style-name="T18"> <text:s text:c="7"/></text:span><text:span text:style-name="T18">}</text:span><text:span text:style-name="T17"><text:line-break/><text:line-break/></text:span><text:span text:style-name="T18"> <text:s text:c="7"/></text:span><text:span text:style-name="T18">return new </text:span><text:span text:style-name="T18">HashMap(){{</text:span><text:span text:style-name="T17"><text:line-break/></text:span><text:span text:style-name="T18"> <text:s text:c="11"/>put(</text:span><text:span text:style-name="T18">"message"</text:span><text:span text:style-name="T18">, </text:span><text:span text:style-name="T18">"Logged out of the system."</text:span><text:span text:style-name="T18">)</text:span><text:span text:style-name="T18">;</text:span><text:span text:style-name="T17"><text:line-break/></text:span><text:span text:style-name="T18"> <text:s text:c="7"/></text:span><text:span text:style-name="T18">}}</text:span><text:span text:style-name="T18">;</text:span><text:span text:style-name="T17"><text:line-break/></text:span><text:span text:style-name="T18"> <text:s text:c="3"/></text:span><text:span text:style-name="T18">}</text:span><text:span text:style-name="T17"><text:line-break/></text:span></text:p>
      <text:p text:style-name="P14"><text:span text:style-name="T27">Ekleyip projeyi çalıştırdıktan sonra localhost:8094 urlsine istek attığımda bizi keycloak login sayfası karşılayacak. Kullanıcı adı ve şifreyi girdikten sonra bilgilere erişebiliriz.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P2"><text:span text:style-name="Source_20_Text"><text:span text:style-name="T6">Yardımcı </text:span></text:span><text:span text:style-name="Source_20_Text"><text:span text:style-name="T15">Api</text:span></text:span></text:p>
      <text:p text:style-name="P2"><text:span text:style-name="Source_20_Text"><text:span text:style-name="T6"/></text:span></text:p>
      <text:p text:style-name="P2"><text:span text:style-name="Source_20_Text"><text:span text:style-name="T1">https://www.keycloak.org/docs/latest</text:span></text:span>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d2da" officeooo:paragraph-rsid="0029d2d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3T09:10:34.175244150</meta:creation-date>
    <dc:date>2024-03-14T13:30:27.946470781</dc:date>
    <meta:editing-duration>PT3H50M52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7" meta:paragraph-count="20" meta:word-count="321" meta:character-count="3828" meta:non-whitespace-character-count="3366"/>
  </office:meta>
</office:document-meta>
</file>